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20000039A6FF158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Mono-Bold" svg:font-family="JetbrainsMono-Bold, Consolas, 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eaf7" officeooo:paragraph-rsid="0017eaf7"/>
    </style:style>
    <style:style style:name="P2" style:family="paragraph" style:parent-style-name="Standard">
      <style:paragraph-properties fo:text-align="left" style:justify-single-word="false"/>
      <style:text-properties officeooo:rsid="0017eaf7" officeooo:paragraph-rsid="0017eaf7"/>
    </style:style>
    <style:style style:name="P3" style:family="paragraph" style:parent-style-name="Standard">
      <style:paragraph-properties fo:text-align="left" style:justify-single-word="false"/>
      <style:text-properties fo:color="#939da5" loext:opacity="100%" style:font-name="JetbrainsMono-Bold" fo:font-size="10.5pt" fo:font-weight="normal" officeooo:rsid="0017eaf7" officeooo:paragraph-rsid="0017eaf7" fo:background-color="#232a2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939da5" loext:opacity="100%" style:font-name="JetbrainsMono-Bold" fo:font-size="10.5pt" fo:font-weight="normal" fo:background-color="#232a2f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paragraph-properties style:line-height-at-least="0.198in"/>
      <style:text-properties fo:color="#939da5" loext:opacity="100%" style:font-name="JetbrainsMono-Bold" fo:font-size="10.5pt" fo:font-weight="normal" fo:background-color="#232a2f"/>
    </style:style>
    <style:style style:name="T1" style:family="text">
      <style:text-properties fo:color="#ff6a80" loext:opacity="100%"/>
    </style:style>
    <style:style style:name="T2" style:family="text">
      <style:text-properties fo:color="#ffa763" loext:opacity="100%"/>
    </style:style>
    <style:style style:name="T3" style:family="text">
      <style:text-properties fo:color="#5bec95" loext:opacity="100%"/>
    </style:style>
    <style:style style:name="T4" style:family="text">
      <style:text-properties fo:color="#89ddff" loext:opacity="100%"/>
    </style:style>
    <style:style style:name="T5" style:family="text">
      <style:text-properties fo:color="#ffea6b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 7</text:p>
      <text:p text:style-name="P1"/>
      <text:p text:style-name="P2">Israel Burgos</text:p>
      <text:p text:style-name="P2">Allan Aguilera</text:p>
      <text:p text:style-name="P2"/>
      <text:p text:style-name="P2">HTML</text:p>
      <text:p text:style-name="P3">&lt;!<text:span text:style-name="T1">DOCTYPE</text:span> <text:span text:style-name="T2">html</text:span>&gt;</text:p>
      <text:p text:style-name="P4">&lt;<text:span text:style-name="T1">html</text:span> <text:span text:style-name="T2">lang</text:span>=<text:span text:style-name="T3">"es"</text:span>&gt;</text:p>
      <text:p text:style-name="P4">&lt;<text:span text:style-name="T1">head</text:span>&gt;</text:p>
      <text:p text:style-name="P4">&lt;<text:span text:style-name="T1">meta</text:span> <text:span text:style-name="T2">charset</text:span>=<text:span text:style-name="T3">"UTF-8"</text:span>&gt;</text:p>
      <text:p text:style-name="P4">&lt;<text:span text:style-name="T1">meta</text:span> <text:span text:style-name="T2">name</text:span>=<text:span text:style-name="T3">"viewport"</text:span> <text:span text:style-name="T2">content</text:span>=<text:span text:style-name="T3">"width=device-width, initial-scale=1.0"</text:span>&gt;</text:p>
      <text:p text:style-name="P4">&lt;<text:span text:style-name="T1">title</text:span>&gt;Pulp Fiction - Información&lt;/<text:span text:style-name="T1">title</text:span>&gt;</text:p>
      <text:p text:style-name="P4">&lt;<text:span text:style-name="T1">link</text:span> <text:span text:style-name="T2">rel</text:span>=<text:span text:style-name="T3">"stylesheet"</text:span> <text:span text:style-name="T2">href</text:span>=<text:span text:style-name="T3">"style.css"</text:span>&gt;</text:p>
      <text:p text:style-name="P4">&lt;/<text:span text:style-name="T1">head</text:span>&gt;</text:p>
      <text:p text:style-name="P4">&lt;<text:span text:style-name="T1">body</text:span>&gt;</text:p>
      <text:p text:style-name="P4">&lt;<text:span text:style-name="T1">div</text:span> <text:span text:style-name="T2">class</text:span>=<text:span text:style-name="T3">"page"</text:span>&gt;</text:p>
      <text:p text:style-name="P4">&lt;<text:span text:style-name="T1">header</text:span> <text:span text:style-name="T2">class</text:span>=<text:span text:style-name="T3">"panel panel-header"</text:span>&gt;</text:p>
      <text:p text:style-name="P4">&lt;<text:span text:style-name="T1">h1</text:span>&gt;&lt;<text:span text:style-name="T1">a</text:span> <text:span text:style-name="T2">href</text:span>=<text:span text:style-name="T3">"https://es.wikipedia.org/wiki/Pulp_Fiction"</text:span> <text:span text:style-name="T2">target</text:span>=<text:span text:style-name="T3">"_blank"</text:span> <text:span text:style-name="T2">rel</text:span>=<text:span text:style-name="T3">"noopener noreferrer"</text:span>&gt;Pulp Fiction&lt;/<text:span text:style-name="T1">a</text:span>&gt;&lt;/<text:span text:style-name="T1">h1</text:span>&gt;</text:p>
      <text:p text:style-name="P4">&lt;<text:span text:style-name="T1">p</text:span> <text:span text:style-name="T2">class</text:span>=<text:span text:style-name="T3">"subtitle"</text:span>&gt;</text:p>
      <text:p text:style-name="P4">Israel Burgos y Allan Aguilera -</text:p>
      <text:p text:style-name="P4">&lt;<text:span text:style-name="T1">a</text:span> <text:span text:style-name="T2">href</text:span>=<text:span text:style-name="T3">"mailto:israelburgos@est.ecotec.edu.ec"</text:span>&gt;israelburgos@est.ecotec.edu.ec&lt;/<text:span text:style-name="T1">a</text:span>&gt;,</text:p>
      <text:p text:style-name="P4">&lt;<text:span text:style-name="T1">a</text:span> <text:span text:style-name="T2">href</text:span>=<text:span text:style-name="T3">"mailto:aaguilera@est.ecotec.edu.ec"</text:span>&gt;aaguilera@est.ecotec.edu.ec&lt;/<text:span text:style-name="T1">a</text:span>&gt;</text:p>
      <text:p text:style-name="P4">&lt;/<text:span text:style-name="T1">p</text:span>&gt;</text:p>
      <text:p text:style-name="P4">&lt;<text:span text:style-name="T1">p</text:span>&gt;Una historia absurda, elegante y caótica donde cada escena deja una huella distinta.&lt;/<text:span text:style-name="T1">p</text:span>&gt;</text:p>
      <text:p text:style-name="P4">&lt;/<text:span text:style-name="T1">header</text:span>&gt;</text:p>
      <text:p text:style-name="P5"/>
      <text:p text:style-name="P4">&lt;<text:span text:style-name="T1">nav</text:span> <text:span text:style-name="T2">class</text:span>=<text:span text:style-name="T3">"menu panel"</text:span> <text:span text:style-name="T2">aria-label</text:span>=<text:span text:style-name="T3">"Navegación de artículos"</text:span>&gt;</text:p>
      <text:p text:style-name="P4">&lt;<text:span text:style-name="T1">a</text:span> <text:span text:style-name="T2">href</text:span>=<text:span text:style-name="T3">"#article-1"</text:span>&gt;Vicent Vega y Jules Winnfield&lt;/<text:span text:style-name="T1">a</text:span>&gt;</text:p>
      <text:p text:style-name="P4">&lt;<text:span text:style-name="T1">a</text:span> <text:span text:style-name="T2">href</text:span>=<text:span text:style-name="T3">"#article-2"</text:span>&gt;Mia Wallace&lt;/<text:span text:style-name="T1">a</text:span>&gt;</text:p>
      <text:p text:style-name="P4">&lt;/<text:span text:style-name="T1">nav</text:span>&gt;</text:p>
      <text:p text:style-name="P5"/>
      <text:p text:style-name="P4">&lt;<text:span text:style-name="T1">section</text:span> <text:span text:style-name="T2">class</text:span>=<text:span text:style-name="T3">"panel panel-section"</text:span> <text:span text:style-name="T2">id</text:span>=<text:span text:style-name="T3">"inicio"</text:span>&gt;</text:p>
      <text:p text:style-name="P4">&lt;<text:span text:style-name="T1">p</text:span>&gt;</text:p>
      <text:p text:style-name="P4">Este recorrido reúne fragmentos, personajes y momentos memorables de una película</text:p>
      <text:p text:style-name="P4">que convirtió el crimen, el humor y la música en una sola pieza de culto.</text:p>
      <text:p text:style-name="P4">&lt;/<text:span text:style-name="T1">p</text:span>&gt;</text:p>
      <text:p text:style-name="P5"/>
      <text:p text:style-name="P4">&lt;<text:span text:style-name="T1">article</text:span> <text:span text:style-name="T2">class</text:span>=<text:span text:style-name="T3">"panel panel-article article-one"</text:span> <text:span text:style-name="T2">id</text:span>=<text:span text:style-name="T3">"article-1"</text:span>&gt;</text:p>
      <text:p text:style-name="P4">&lt;<text:span text:style-name="T1">h2</text:span>&gt;Vicent Vega y Jules Winnfield&lt;/<text:span text:style-name="T1">h2</text:span>&gt;</text:p>
      <text:p text:style-name="P4">&lt;<text:span text:style-name="T1">img</text:span> <text:span text:style-name="T2">class</text:span>=<text:span text:style-name="T3">"article-image"</text:span> <text:span text:style-name="T2">src</text:span>=<text:span text:style-name="T3">"../assets/img/vincent_jules.jpeg"</text:span> <text:span text:style-name="T2">alt</text:span>=<text:span text:style-name="T3">"Escena de Pulp Fiction"</text:span>&gt;</text:p>
      <text:p text:style-name="P4">&lt;<text:span text:style-name="T1">p</text:span>&gt;</text:p>
      <text:p text:style-name="P4">La historia sigue a personajes como Vincent Vega y Jules Winnfield, dos sicarios que trabajan para el jefe del </text:p>
      <text:p text:style-name="P4">crimen organizado Marsellus Wallace, mientras que otras tramas involucran a un boxeador que intenta escapar de la mafia y </text:p>
      <text:p text:style-name="P4">a una pareja que intenta robar en un restaurante.</text:p>
      <text:p text:style-name="P4">&lt;/<text:span text:style-name="T1">p</text:span>&gt;</text:p>
      <text:p text:style-name="P4">&lt;/<text:span text:style-name="T1">article</text:span>&gt;</text:p>
      <text:p text:style-name="P5"/>
      <text:p text:style-name="P4">&lt;<text:span text:style-name="T1">article</text:span> <text:span text:style-name="T2">class</text:span>=<text:span text:style-name="T3">"panel panel-article article-two"</text:span> <text:span text:style-name="T2">id</text:span>=<text:span text:style-name="T3">"article-2"</text:span>&gt;</text:p>
      <text:p text:style-name="P4"><text:soft-page-break/>&lt;<text:span text:style-name="T1">h2</text:span>&gt;Mia Wallace&lt;/<text:span text:style-name="T1">h2</text:span>&gt;</text:p>
      <text:p text:style-name="P4">&lt;<text:span text:style-name="T1">p</text:span>&gt;</text:p>
      <text:p text:style-name="P4">Mia Wallace es un personaje ficticio interpretado por Uma Thurman en la película de 1994 de Quentin Tarantino, </text:p>
      <text:p text:style-name="P4">Pulp Fiction. Thurman recibió una nominación al </text:p>
      <text:p text:style-name="P4">Óscar a la mejor actriz de reparto por su interpretación, y el personaje se convirtió en un ícono cultural.</text:p>
      <text:p text:style-name="P4">&lt;/<text:span text:style-name="T1">p</text:span>&gt;</text:p>
      <text:p text:style-name="P4">&lt;<text:span text:style-name="T1">p</text:span>&gt;</text:p>
      <text:p text:style-name="P4">Mia se inspiró en la actriz Ana Karina, una figura destacada de la Nueva Ola Francesa y musa de Jean-Luc Godard. </text:p>
      <text:p text:style-name="P4">Para el look de Mia en la película, diseñadora de vestuario Betsy Heimann creó su apariencia para que fuera la de </text:p>
      <text:p text:style-name="P4">una mujer Perro de embalse. También incluyó marcas de diseñadores como Chanel para demostrar que ella es la moll de </text:p>
      <text:p text:style-name="P4">un rico jefe criminal. </text:p>
      <text:p text:style-name="P4">Además, su apariencia se inspiró en cine mudo estrellas y destinado a invocar un mujer fatal. </text:p>
      <text:p text:style-name="P4">La personalidad y la apariencia de Mia también recuerdan a Elvira Hancock de Brian De Palma's Cara de cicatriz.</text:p>
      <text:p text:style-name="P4">&lt;/<text:span text:style-name="T1">p</text:span>&gt;</text:p>
      <text:p text:style-name="P4">&lt;/<text:span text:style-name="T1">article</text:span>&gt;</text:p>
      <text:p text:style-name="P4">&lt;/<text:span text:style-name="T1">section</text:span>&gt;</text:p>
      <text:p text:style-name="P5"/>
      <text:p text:style-name="P4">&lt;<text:span text:style-name="T1">footer</text:span> <text:span text:style-name="T2">class</text:span>=<text:span text:style-name="T3">"panel panel-footer"</text:span>&gt;</text:p>
      <text:p text:style-name="P4">&lt;<text:span text:style-name="T1">p</text:span>&gt;2026 - Programación Web&lt;/<text:span text:style-name="T1">p</text:span>&gt;</text:p>
      <text:p text:style-name="P4">&lt;/<text:span text:style-name="T1">footer</text:span>&gt;</text:p>
      <text:p text:style-name="P4">&lt;/<text:span text:style-name="T1">div</text:span>&gt;</text:p>
      <text:p text:style-name="P4">&lt;/<text:span text:style-name="T1">body</text:span>&gt;</text:p>
      <text:p text:style-name="P4">&lt;/<text:span text:style-name="T1">html</text:span>&gt;</text:p>
      <text:p text:style-name="P2"/>
      <text:p text:style-name="P2"/>
      <text:p text:style-name="P2">CSS</text:p>
      <text:p text:style-name="P2"/>
      <text:p text:style-name="P3"><text:span text:style-name="T2">:root</text:span> {</text:p>
      <text:p text:style-name="P4">--space: <text:span text:style-name="T4">1</text:span>rem;</text:p>
      <text:p text:style-name="P4">--radius: <text:span text:style-name="T4">0.75</text:span>rem;</text:p>
      <text:p text:style-name="P4">--header-bg: <text:span text:style-name="T2">#111111</text:span>;</text:p>
      <text:p text:style-name="P4">--section-bg: <text:span text:style-name="T2">#f4e4b8</text:span>;</text:p>
      <text:p text:style-name="P4">--article-bg: <text:span text:style-name="T2">#d6a24f</text:span>;</text:p>
      <text:p text:style-name="P4">--footer-bg: <text:span text:style-name="T2">#c5161d</text:span>;</text:p>
      <text:p text:style-name="P4">--menu-bg: <text:span text:style-name="T2">#f4d35e</text:span>;</text:p>
      <text:p text:style-name="P4">--text-dark: <text:span text:style-name="T2">#1b1b1b</text:span>;</text:p>
      <text:p text:style-name="P4">--text-light: <text:span text:style-name="T2">#fff8e7</text:span>;</text:p>
      <text:p text:style-name="P4">}</text:p>
      <text:p text:style-name="P5"/>
      <text:p text:style-name="P4"><text:span text:style-name="T1">*</text:span> {</text:p>
      <text:p text:style-name="P4">box-sizing: <text:span text:style-name="T2">border-box</text:span>;</text:p>
      <text:p text:style-name="P4">}</text:p>
      <text:p text:style-name="P5"/>
      <text:p text:style-name="P4"><text:span text:style-name="T1">html</text:span> {</text:p>
      <text:p text:style-name="P4">scroll-behavior: <text:span text:style-name="T2">smooth</text:span>;</text:p>
      <text:p text:style-name="P4"><text:soft-page-break/>}</text:p>
      <text:p text:style-name="P5"/>
      <text:p text:style-name="P4"><text:span text:style-name="T1">body</text:span> {</text:p>
      <text:p text:style-name="P4">margin: <text:span text:style-name="T4">0</text:span>;</text:p>
      <text:p text:style-name="P4">min-height: <text:span text:style-name="T4">100</text:span>vh;</text:p>
      <text:p text:style-name="P4">padding: <text:span text:style-name="T5">var</text:span><text:span text:style-name="T2">(</text:span>--space<text:span text:style-name="T2">)</text:span>;</text:p>
      <text:p text:style-name="P4">font-family: Georgia<text:span text:style-name="T2">, </text:span><text:span text:style-name="T3">'Times New Roman'</text:span><text:span text:style-name="T2">, </text:span>serif;</text:p>
      <text:p text:style-name="P4">background: <text:span text:style-name="T2">#2b1b18</text:span>;</text:p>
      <text:p text:style-name="P4">color: <text:span text:style-name="T5">var</text:span><text:span text:style-name="T2">(</text:span>--text-dark<text:span text:style-name="T2">)</text:span>;</text:p>
      <text:p text:style-name="P4">}</text:p>
      <text:p text:style-name="P5"/>
      <text:p text:style-name="P4"><text:span text:style-name="T2">.page</text:span> {</text:p>
      <text:p text:style-name="P4">max-width: <text:span text:style-name="T4">1100</text:span><text:span text:style-name="T2">px</text:span>;</text:p>
      <text:p text:style-name="P4">margin: <text:span text:style-name="T4">0</text:span><text:span text:style-name="T2"> auto</text:span>;</text:p>
      <text:p text:style-name="P4">}</text:p>
      <text:p text:style-name="P5"/>
      <text:p text:style-name="P4"><text:span text:style-name="T2">.panel</text:span> {</text:p>
      <text:p text:style-name="P4">margin-bottom: <text:span text:style-name="T5">var</text:span><text:span text:style-name="T2">(</text:span>--space<text:span text:style-name="T2">)</text:span>;</text:p>
      <text:p text:style-name="P4">border-radius: <text:span text:style-name="T5">var</text:span><text:span text:style-name="T2">(</text:span>--radius<text:span text:style-name="T2">)</text:span>;</text:p>
      <text:p text:style-name="P4">padding: <text:span text:style-name="T5">var</text:span><text:span text:style-name="T2">(</text:span>--space<text:span text:style-name="T2">)</text:span>;</text:p>
      <text:p text:style-name="P4">}</text:p>
      <text:p text:style-name="P5"/>
      <text:p text:style-name="P4"><text:span text:style-name="T2">.panel-header</text:span> {</text:p>
      <text:p text:style-name="P4">background: <text:span text:style-name="T5">var</text:span><text:span text:style-name="T2">(</text:span>--header-bg<text:span text:style-name="T2">)</text:span>;</text:p>
      <text:p text:style-name="P4">color: <text:span text:style-name="T5">var</text:span><text:span text:style-name="T2">(</text:span>--text-light<text:span text:style-name="T2">)</text:span>;</text:p>
      <text:p text:style-name="P4">}</text:p>
      <text:p text:style-name="P5"/>
      <text:p text:style-name="P4"><text:span text:style-name="T2">.panel-header</text:span> <text:span text:style-name="T1">a</text:span>,</text:p>
      <text:p text:style-name="P4"><text:span text:style-name="T2">.panel-footer</text:span> <text:span text:style-name="T1">a</text:span>,</text:p>
      <text:p text:style-name="P4"><text:span text:style-name="T2">.menu</text:span> <text:span text:style-name="T1">a</text:span> {</text:p>
      <text:p text:style-name="P4">color: <text:span text:style-name="T2">inherit</text:span>;</text:p>
      <text:p text:style-name="P4">}</text:p>
      <text:p text:style-name="P5"/>
      <text:p text:style-name="P4"><text:span text:style-name="T2">.panel-header</text:span> <text:span text:style-name="T1">h1</text:span>,</text:p>
      <text:p text:style-name="P4"><text:span text:style-name="T2">.panel-header</text:span> <text:span text:style-name="T1">p</text:span>,</text:p>
      <text:p text:style-name="P4"><text:span text:style-name="T2">.panel-footer</text:span> <text:span text:style-name="T1">p</text:span>,</text:p>
      <text:p text:style-name="P4"><text:span text:style-name="T2">.panel-section</text:span> <text:span text:style-name="T1">p</text:span>,</text:p>
      <text:p text:style-name="P4"><text:span text:style-name="T2">.panel-article</text:span> <text:span text:style-name="T1">p</text:span> {</text:p>
      <text:p text:style-name="P4">margin: <text:span text:style-name="T4">0</text:span>;</text:p>
      <text:p text:style-name="P4">}</text:p>
      <text:p text:style-name="P5"/>
      <text:p text:style-name="P4"><text:span text:style-name="T2">.panel-header</text:span> <text:span text:style-name="T1">h1</text:span> {</text:p>
      <text:p text:style-name="P4">margin-bottom: <text:span text:style-name="T4">0.5</text:span>rem;</text:p>
      <text:p text:style-name="P4">font-size: <text:span text:style-name="T5">clamp</text:span><text:span text:style-name="T2">(</text:span><text:span text:style-name="T4">2</text:span>rem<text:span text:style-name="T2">, </text:span><text:span text:style-name="T4">5</text:span>vw<text:span text:style-name="T2">, </text:span><text:span text:style-name="T4">3.5</text:span>rem<text:span text:style-name="T2">)</text:span>;</text:p>
      <text:p text:style-name="P4">}</text:p>
      <text:p text:style-name="P5"/>
      <text:p text:style-name="P4"><text:span text:style-name="T2">.subtitle</text:span> {</text:p>
      <text:p text:style-name="P4">margin-bottom: <text:span text:style-name="T4">0.75</text:span>rem;</text:p>
      <text:p text:style-name="P4">font-size: <text:span text:style-name="T4">1.05</text:span>rem;</text:p>
      <text:p text:style-name="P4">}</text:p>
      <text:p text:style-name="P5"><text:soft-page-break/></text:p>
      <text:p text:style-name="P4"><text:span text:style-name="T2">.menu</text:span> {</text:p>
      <text:p text:style-name="P4">background: <text:span text:style-name="T5">var</text:span><text:span text:style-name="T2">(</text:span>--menu-bg<text:span text:style-name="T2">)</text:span>;</text:p>
      <text:p text:style-name="P4">display: <text:span text:style-name="T2">flex</text:span>;</text:p>
      <text:p text:style-name="P4">gap: <text:span text:style-name="T4">1</text:span>rem;</text:p>
      <text:p text:style-name="P4">flex-wrap: <text:span text:style-name="T2">wrap</text:span>;</text:p>
      <text:p text:style-name="P4">}</text:p>
      <text:p text:style-name="P5"/>
      <text:p text:style-name="P4"><text:span text:style-name="T2">.menu</text:span> <text:span text:style-name="T1">a</text:span> {</text:p>
      <text:p text:style-name="P4">text-decoration: <text:span text:style-name="T2">none</text:span>;</text:p>
      <text:p text:style-name="P4">font-weight: <text:span text:style-name="T4">700</text:span>;</text:p>
      <text:p text:style-name="P4">padding: <text:span text:style-name="T4">0.65</text:span>rem<text:span text:style-name="T2"> </text:span><text:span text:style-name="T4">1</text:span>rem;</text:p>
      <text:p text:style-name="P4">border-radius: <text:span text:style-name="T4">999</text:span><text:span text:style-name="T2">px</text:span>;</text:p>
      <text:p text:style-name="P4">background: <text:span text:style-name="T5">rgba</text:span><text:span text:style-name="T2">(</text:span><text:span text:style-name="T4">255</text:span><text:span text:style-name="T2">, </text:span><text:span text:style-name="T4">255</text:span><text:span text:style-name="T2">, </text:span><text:span text:style-name="T4">255</text:span><text:span text:style-name="T2">, </text:span><text:span text:style-name="T4">0.4</text:span><text:span text:style-name="T2">)</text:span>;</text:p>
      <text:p text:style-name="P4">}</text:p>
      <text:p text:style-name="P5"/>
      <text:p text:style-name="P4"><text:span text:style-name="T2">.panel-section</text:span>,</text:p>
      <text:p text:style-name="P4"><text:span text:style-name="T2">.panel-article</text:span> {</text:p>
      <text:p text:style-name="P4">padding: <text:span text:style-name="T5">var</text:span><text:span text:style-name="T2">(</text:span>--space<text:span text:style-name="T2">)</text:span>;</text:p>
      <text:p text:style-name="P4">}</text:p>
      <text:p text:style-name="P5"/>
      <text:p text:style-name="P4"><text:span text:style-name="T2">.panel-section</text:span> {</text:p>
      <text:p text:style-name="P4">background: <text:span text:style-name="T5">var</text:span><text:span text:style-name="T2">(</text:span>--section-bg<text:span text:style-name="T2">)</text:span>;</text:p>
      <text:p text:style-name="P4">}</text:p>
      <text:p text:style-name="P5"/>
      <text:p text:style-name="P4"><text:span text:style-name="T2">.panel-section</text:span> &gt; <text:span text:style-name="T1">p</text:span> {</text:p>
      <text:p text:style-name="P4">margin-bottom: <text:span text:style-name="T5">var</text:span><text:span text:style-name="T2">(</text:span>--space<text:span text:style-name="T2">)</text:span>;</text:p>
      <text:p text:style-name="P4">max-width: <text:span text:style-name="T4">70</text:span>ch;</text:p>
      <text:p text:style-name="P4">}</text:p>
      <text:p text:style-name="P5"/>
      <text:p text:style-name="P4"><text:span text:style-name="T2">.panel-article</text:span> {</text:p>
      <text:p text:style-name="P4">background: <text:span text:style-name="T5">var</text:span><text:span text:style-name="T2">(</text:span>--article-bg<text:span text:style-name="T2">)</text:span>;</text:p>
      <text:p text:style-name="P4">}</text:p>
      <text:p text:style-name="P5"/>
      <text:p text:style-name="P4"><text:span text:style-name="T2">.panel-article</text:span> + <text:span text:style-name="T2">.panel-article</text:span> {</text:p>
      <text:p text:style-name="P4">margin-top: <text:span text:style-name="T5">var</text:span><text:span text:style-name="T2">(</text:span>--space<text:span text:style-name="T2">)</text:span>;</text:p>
      <text:p text:style-name="P4">}</text:p>
      <text:p text:style-name="P5"/>
      <text:p text:style-name="P4"><text:span text:style-name="T2">.article-one</text:span> {</text:p>
      <text:p text:style-name="P4">background: <text:span text:style-name="T2">#b56a2e</text:span>;</text:p>
      <text:p text:style-name="P4">}</text:p>
      <text:p text:style-name="P5"/>
      <text:p text:style-name="P4"><text:span text:style-name="T2">.article-two</text:span> {</text:p>
      <text:p text:style-name="P4">color: <text:span text:style-name="T5">var</text:span><text:span text:style-name="T2">(</text:span>--text-light<text:span text:style-name="T2">)</text:span>;</text:p>
      <text:p text:style-name="P4">background-image: <text:span text:style-name="T5">url</text:span><text:span text:style-name="T2">(</text:span><text:span text:style-name="T3">'../assets/img/background_article.jpg'</text:span><text:span text:style-name="T2">)</text:span>;</text:p>
      <text:p text:style-name="P4">background-size: <text:span text:style-name="T2">cover</text:span>;</text:p>
      <text:p text:style-name="P4">background-position: <text:span text:style-name="T2">center</text:span>;</text:p>
      <text:p text:style-name="P4">background-repeat: <text:span text:style-name="T2">no-repeat</text:span>;</text:p>
      <text:p text:style-name="P4">}</text:p>
      <text:p text:style-name="P5"/>
      <text:p text:style-name="P4"><text:soft-page-break/><text:span text:style-name="T2">.article-two</text:span> <text:span text:style-name="T1">p</text:span>,</text:p>
      <text:p text:style-name="P4"><text:span text:style-name="T2">.article-two</text:span> <text:span text:style-name="T1">h2</text:span> {</text:p>
      <text:p text:style-name="P4">text-shadow: <text:span text:style-name="T4">0</text:span><text:span text:style-name="T2"> </text:span><text:span text:style-name="T4">2</text:span><text:span text:style-name="T2">px </text:span><text:span text:style-name="T4">6</text:span><text:span text:style-name="T2">px </text:span><text:span text:style-name="T5">rgba</text:span><text:span text:style-name="T2">(</text:span><text:span text:style-name="T4">0</text:span><text:span text:style-name="T2">, </text:span><text:span text:style-name="T4">0</text:span><text:span text:style-name="T2">, </text:span><text:span text:style-name="T4">0</text:span><text:span text:style-name="T2">, </text:span><text:span text:style-name="T4">0.6</text:span><text:span text:style-name="T2">)</text:span>;</text:p>
      <text:p text:style-name="P4">}</text:p>
      <text:p text:style-name="P5"/>
      <text:p text:style-name="P4"><text:span text:style-name="T2">.panel-article</text:span> <text:span text:style-name="T1">h2</text:span> {</text:p>
      <text:p text:style-name="P4">margin: <text:span text:style-name="T4">0</text:span><text:span text:style-name="T2"> </text:span><text:span text:style-name="T4">0</text:span><text:span text:style-name="T2"> </text:span><text:span text:style-name="T4">0.75</text:span>rem;</text:p>
      <text:p text:style-name="P4">font-size: <text:span text:style-name="T4">1.5</text:span>rem;</text:p>
      <text:p text:style-name="P4">}</text:p>
      <text:p text:style-name="P5"/>
      <text:p text:style-name="P4"><text:span text:style-name="T2">.article-image</text:span> {</text:p>
      <text:p text:style-name="P4">display: <text:span text:style-name="T2">block</text:span>;</text:p>
      <text:p text:style-name="P4">float: <text:span text:style-name="T2">right</text:span>;</text:p>
      <text:p text:style-name="P4">width: <text:span text:style-name="T5">min</text:span><text:span text:style-name="T2">(</text:span><text:span text:style-name="T4">42</text:span>%<text:span text:style-name="T2">, </text:span><text:span text:style-name="T4">260</text:span><text:span text:style-name="T2">px)</text:span>;</text:p>
      <text:p text:style-name="P4">height: <text:span text:style-name="T2">auto</text:span>;</text:p>
      <text:p text:style-name="P4">margin: <text:span text:style-name="T4">0</text:span><text:span text:style-name="T2"> </text:span><text:span text:style-name="T4">0</text:span><text:span text:style-name="T2"> </text:span><text:span text:style-name="T4">0.9</text:span>rem<text:span text:style-name="T2"> </text:span><text:span text:style-name="T4">1</text:span>rem;</text:p>
      <text:p text:style-name="P4">border-radius: <text:span text:style-name="T4">0.6</text:span>rem;</text:p>
      <text:p text:style-name="P4">border: <text:span text:style-name="T4">4</text:span><text:span text:style-name="T2">px solid </text:span><text:span text:style-name="T5">rgba</text:span><text:span text:style-name="T2">(</text:span><text:span text:style-name="T4">255</text:span><text:span text:style-name="T2">, </text:span><text:span text:style-name="T4">248</text:span><text:span text:style-name="T2">, </text:span><text:span text:style-name="T4">231</text:span><text:span text:style-name="T2">, </text:span><text:span text:style-name="T4">0.55</text:span><text:span text:style-name="T2">)</text:span>;</text:p>
      <text:p text:style-name="P4">box-shadow: <text:span text:style-name="T4">0</text:span><text:span text:style-name="T2"> </text:span><text:span text:style-name="T4">8</text:span><text:span text:style-name="T2">px </text:span><text:span text:style-name="T4">18</text:span><text:span text:style-name="T2">px </text:span><text:span text:style-name="T5">rgba</text:span><text:span text:style-name="T2">(</text:span><text:span text:style-name="T4">0</text:span><text:span text:style-name="T2">, </text:span><text:span text:style-name="T4">0</text:span><text:span text:style-name="T2">, </text:span><text:span text:style-name="T4">0</text:span><text:span text:style-name="T2">, </text:span><text:span text:style-name="T4">0.18</text:span><text:span text:style-name="T2">)</text:span>;</text:p>
      <text:p text:style-name="P4">}</text:p>
      <text:p text:style-name="P5"/>
      <text:p text:style-name="P4"><text:span text:style-name="T2">.article-one::after</text:span> {</text:p>
      <text:p text:style-name="P4">content: <text:span text:style-name="T3">""</text:span>;</text:p>
      <text:p text:style-name="P4">display: <text:span text:style-name="T2">block</text:span>;</text:p>
      <text:p text:style-name="P4">clear: <text:span text:style-name="T2">both</text:span>;</text:p>
      <text:p text:style-name="P4">}</text:p>
      <text:p text:style-name="P5"/>
      <text:p text:style-name="P4"><text:span text:style-name="T2">.panel-footer</text:span> {</text:p>
      <text:p text:style-name="P4">background: <text:span text:style-name="T5">var</text:span><text:span text:style-name="T2">(</text:span>--footer-bg<text:span text:style-name="T2">)</text:span>;</text:p>
      <text:p text:style-name="P4">color: <text:span text:style-name="T5">var</text:span><text:span text:style-name="T2">(</text:span>--text-light<text:span text:style-name="T2">)</text:span>;</text:p>
      <text:p text:style-name="P4">text-align: <text:span text:style-name="T2">center</text:span>;</text:p>
      <text:p text:style-name="P4">}</text:p>
      <text:p text:style-name="P5"/>
      <text:p text:style-name="P4"><text:span text:style-name="T2">.panel-footer</text:span> <text:span text:style-name="T1">p</text:span> {</text:p>
      <text:p text:style-name="P4">font-weight: <text:span text:style-name="T4">700</text:span>;</text:p>
      <text:p text:style-name="P4">}</text:p>
      <text:p text:style-name="P6"/>
      <text:p text:style-name="P2"><draw:frame draw:style-name="fr1" draw:name="Image1" text:anchor-type="char" svg:width="6.6929in" svg:height="3.2374in" draw:z-index="0"><draw:image xlink:href="Pictures/10000001000007720000039A6FF1586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Mono-Bold" svg:font-family="JetbrainsMono-Bold, Consolas, 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13:48:17.048247861</meta:creation-date>
    <dc:date>2026-06-09T13:50:21.376625702</dc:date>
    <meta:editing-duration>PT2M5S</meta:editing-duration>
    <meta:editing-cycles>1</meta:editing-cycles>
    <meta:document-statistic meta:table-count="0" meta:image-count="1" meta:object-count="0" meta:page-count="6" meta:paragraph-count="194" meta:word-count="651" meta:character-count="4766" meta:non-whitespace-character-count="4325"/>
    <meta:generator>LibreOffice/26.2.3.2$Linux_X86_64 LibreOffice_project/d4d5ed47b6084125f28d269a5650105d54dde034</meta:generator>
  </office:meta>
</office:document-meta>
</file>