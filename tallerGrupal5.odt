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deNewRoman Nerd Font Propo" svg:font-family="'CodeNewRoman Nerd Font Propo', Consolas, 'Courier New', monospace, 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6fbd" officeooo:paragraph-rsid="00086fbd"/>
    </style:style>
    <style:style style:name="P2" style:family="paragraph" style:parent-style-name="Standard">
      <style:paragraph-properties fo:text-align="left" style:justify-single-word="false"/>
      <style:text-properties officeooo:rsid="00086fbd" officeooo:paragraph-rsid="00086fbd"/>
    </style:style>
    <style:style style:name="P3" style:family="paragraph" style:parent-style-name="Standard">
      <style:paragraph-properties fo:text-align="left" style:justify-single-word="false"/>
      <style:text-properties officeooo:paragraph-rsid="00086fbd"/>
    </style:style>
    <style:style style:name="P4" style:family="paragraph" style:parent-style-name="Standard">
      <style:paragraph-properties fo:text-align="left" style:justify-single-word="false"/>
      <style:text-properties officeooo:rsid="00092b48" officeooo:paragraph-rsid="00092b48"/>
    </style:style>
    <style:style style:name="P5" style:family="paragraph" style:parent-style-name="Standard">
      <style:paragraph-properties fo:text-align="left" style:justify-single-word="false"/>
      <style:text-properties fo:color="#c9d1d9" loext:opacity="100%" style:font-name="CodeNewRoman Nerd Font Propo" fo:font-size="10.5pt" fo:font-weight="normal" officeooo:rsid="00092b48" officeooo:paragraph-rsid="00092b48" fo:background-color="#0d1117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9d1d9" loext:opacity="100%" style:font-name="CodeNewRoman Nerd Font Propo" fo:font-size="10.5pt" fo:font-weight="normal" fo:background-color="#0d1117"/>
    </style:style>
    <style:style style:name="P7" style:family="paragraph" style:parent-style-name="Standard">
      <style:paragraph-properties style:line-height-at-least="0.198in"/>
    </style:style>
    <style:style style:name="T1" style:family="text">
      <style:text-properties officeooo:rsid="00086fbd"/>
    </style:style>
    <style:style style:name="T2" style:family="text">
      <style:text-properties style:text-line-through-style="none" style:text-line-through-type="none" fo:font-family="'Times New Roman'" style:font-family-generic="roman" style:font-pitch="variable" fo:font-size="12pt" style:text-underline-style="none" fo:font-weight="normal" style:text-blinking="false" loext:padding="0in" loext:border="none"/>
    </style:style>
    <style:style style:name="T3" style:family="text">
      <style:text-properties style:text-line-through-style="none" style:text-line-through-type="none" fo:font-family="'Times New Roman'" style:font-family-generic="roman" style:font-pitch="variabl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2c2e35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style:text-line-through-style="none" style:text-line-through-type="none" fo:font-family="'Times New Roman'" style:font-family-generic="roman" style:font-pitch="variable" fo:font-size="10.5pt" style:text-underline-style="none" fo:font-weight="normal" officeooo:rsid="00086fbd" style:text-blinking="false" loext:padding-left="0in" loext:padding-right="0in" loext:padding-top="0in" loext:padding-bottom="0.0193in" loext:border-left="none" loext:border-right="none" loext:border-top="none" loext:border-bottom="0.06pt solid #2c2e35"/>
    </style:style>
    <style:style style:name="T6" style:family="text">
      <style:text-properties fo:color="#a5d6ff" loext:opacity="100%"/>
    </style:style>
    <style:style style:name="T7" style:family="text">
      <style:text-properties fo:color="#79c0ff" loext:opacity="100%"/>
    </style:style>
    <style:style style:name="T8" style:family="text">
      <style:text-properties fo:color="#fdac54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Grupal – 5</text:p>
      <text:p text:style-name="P2">Israel Burgos</text:p>
      <text:p text:style-name="P2">Allan Aguilera</text:p>
      <text:p text:style-name="P2">Alexander Sanchez </text:p>
      <text:p text:style-name="P2"/>
      <text:p text:style-name="P2">1.- HTML es un lenguaje de etiquetas que nos permite darle el esqueleto a la pagina web.</text:p>
      <text:p text:style-name="P2"/>
      <text:p text:style-name="P2">2.- Que la etiqueta de estructura nos permite darle forma a la pagina web, en cambio, la etiqueta de contenido nos permite darle diseno a la pagina web.</text:p>
      <text:p text:style-name="P2"/>
      <text:p text:style-name="P3"><text:span text:style-name="T1">3.- </text:span><text:span text:style-name="T2">Las etiquetas de encabezado (de </text:span><text:span text:style-name="Source_20_Text"><text:span text:style-name="T3">&lt;h1&gt;</text:span></text:span><text:span text:style-name="T4"> a </text:span><text:span text:style-name="Source_20_Text"><text:span text:style-name="T3">&lt;h</text:span></text:span><text:span text:style-name="Source_20_Text"><text:span text:style-name="T5">6</text:span></text:span><text:span text:style-name="Source_20_Text"><text:span text:style-name="T3">&gt;</text:span></text:span><text:span text:style-name="T4">) </text:span>sirven para jerarquizar y estructurar el contenido de una página web. <text:span text:style-name="T1">Contribuye dandole una organizacion a la pagina web con sus titulos.</text:span></text:p>
      <text:p text:style-name="P3"/>
      <text:p text:style-name="P3"><text:span text:style-name="T1">4.- </text:span>Las tablas en HTML se utilizan para organizar y mostrar información en filas y columnas cuando los datos tienen una relación estructurada, como horarios, listas de productos o calificaciones. Las etiquetas <text:span text:style-name="Source_20_Text">&lt;table&gt;</text:span>, <text:span text:style-name="Source_20_Text">&lt;tr&gt;</text:span>, <text:span text:style-name="Source_20_Text">&lt;th&gt;</text:span> y <text:span text:style-name="Source_20_Text">&lt;td&gt;</text:span> permiten crear la tabla, definir filas, establecer encabezados y agregar celdas de datos respectivamente.</text:p>
      <text:p text:style-name="P3"/>
      <text:p text:style-name="P2">5.- Para insertar una imagen en html se utiliza la etiqueta &lt;img&gt;, el uso de src es darle la ruta donde se encuentra la imagen y asi visualizarla en la pagina web, y alt es darle una alternativa a la pagina web, en el caso de que la pagina web no encuentre la ruta de la imagen, se coloque un pequeno texto que indique que imagen era.</text:p>
      <text:p text:style-name="P2"/>
      <text:p text:style-name="P4">6.-</text:p>
      <text:p text:style-name="P5">&lt;!<text:span text:style-name="T6">DOCTYPE</text:span> <text:span text:style-name="T7">html</text:span>&gt;</text:p>
      <text:p text:style-name="P6">&lt;<text:span text:style-name="T6">html</text:span> <text:span text:style-name="T7">lang</text:span>=<text:span text:style-name="T6">"es"</text:span>&gt;</text:p>
      <text:p text:style-name="P6">&lt;<text:span text:style-name="T6">head</text:span>&gt;</text:p>
      <text:p text:style-name="P6">&lt;<text:span text:style-name="T6">meta</text:span> <text:span text:style-name="T7">charset</text:span>=<text:span text:style-name="T6">"UTF-8"</text:span>&gt;</text:p>
      <text:p text:style-name="P6">&lt;<text:span text:style-name="T6">meta</text:span> <text:span text:style-name="T7">name</text:span>=<text:span text:style-name="T6">"viewport"</text:span> <text:span text:style-name="T7">content</text:span>=<text:span text:style-name="T6">"width=device-width, initial-scale=1.0"</text:span>&gt;</text:p>
      <text:p text:style-name="P6">&lt;<text:span text:style-name="T6">title</text:span>&gt;Cristiano Ronaldo&lt;/<text:span text:style-name="T6">title</text:span>&gt;</text:p>
      <text:p text:style-name="P6">&lt;/<text:span text:style-name="T6">head</text:span>&gt;</text:p>
      <text:p text:style-name="P6">&lt;<text:span text:style-name="T6">body</text:span>&gt;</text:p>
      <text:p text:style-name="P6">&lt;<text:span text:style-name="T6">h1</text:span>&gt;Cristiano Ronaldo&lt;/<text:span text:style-name="T6">h1</text:span>&gt;</text:p>
      <text:p text:style-name="P7"/>
      <text:p text:style-name="P6">&lt;<text:span text:style-name="T6">img</text:span> <text:span text:style-name="T7">src</text:span>=<text:span text:style-name="T6">"assets/img/cristiano.webp"</text:span> <text:span text:style-name="T7">alt</text:span>=<text:span text:style-name="T6">"Cristiano Ronaldo posando con su uniforme de futbol"</text:span>&gt;</text:p>
      <text:p text:style-name="P7"/>
      <text:p text:style-name="P6">&lt;<text:span text:style-name="T6">h2</text:span>&gt;Presentación&lt;/<text:span text:style-name="T6">h2</text:span>&gt;</text:p>
      <text:p text:style-name="P6">&lt;<text:span text:style-name="T6">p</text:span>&gt;Cristiano Ronaldo es uno de los futbolistas más reconocidos del mundo. Se ha destacado por su disciplina, su capacidad goleadora y su gran compromiso con el deporte a lo largo de su carrera profesional.&lt;/<text:span text:style-name="T6">p</text:span>&gt;</text:p>
      <text:p text:style-name="P7"/>
      <text:p text:style-name="P6">&lt;<text:span text:style-name="T6">h2</text:span>&gt;Descripción personal&lt;/<text:span text:style-name="T6">h2</text:span>&gt;</text:p>
      <text:p text:style-name="P6">&lt;<text:span text:style-name="T6">p</text:span>&gt;Es un deportista portugués que ha jugado en algunos de los clubes más importantes de Europa. Su trayectoria lo ha convertido en una figura inspiradora para millones de personas por su constancia y esfuerzo dentro y fuera de la cancha.&lt;/<text:span text:style-name="T6">p</text:span>&gt;</text:p>
      <text:p text:style-name="P7"/>
      <text:p text:style-name="P6">&lt;<text:span text:style-name="T6">h3</text:span>&gt;Datos generales&lt;/<text:span text:style-name="T6">h3</text:span>&gt;</text:p>
      <text:p text:style-name="P6">&lt;<text:span text:style-name="T6">table</text:span> <text:span text:style-name="T8">border</text:span>=<text:span text:style-name="T6">"1"</text:span>&gt;</text:p>
      <text:p text:style-name="P6">&lt;<text:span text:style-name="T6">tr</text:span>&gt;</text:p>
      <text:p text:style-name="P6">&lt;<text:span text:style-name="T6">th</text:span>&gt;Nombre&lt;/<text:span text:style-name="T6">th</text:span>&gt;</text:p>
      <text:p text:style-name="P6"><text:soft-page-break/>&lt;<text:span text:style-name="T6">th</text:span>&gt;Edad&lt;/<text:span text:style-name="T6">th</text:span>&gt;</text:p>
      <text:p text:style-name="P6">&lt;<text:span text:style-name="T6">th</text:span>&gt;Ciudad&lt;/<text:span text:style-name="T6">th</text:span>&gt;</text:p>
      <text:p text:style-name="P6">&lt;<text:span text:style-name="T6">th</text:span>&gt;Carrera o profesión&lt;/<text:span text:style-name="T6">th</text:span>&gt;</text:p>
      <text:p text:style-name="P6">&lt;/<text:span text:style-name="T6">tr</text:span>&gt;</text:p>
      <text:p text:style-name="P6">&lt;<text:span text:style-name="T6">tr</text:span>&gt;</text:p>
      <text:p text:style-name="P6">&lt;<text:span text:style-name="T6">td</text:span>&gt;Cristiano Ronaldo&lt;/<text:span text:style-name="T6">td</text:span>&gt;</text:p>
      <text:p text:style-name="P6">&lt;<text:span text:style-name="T6">td</text:span>&gt;40&lt;/<text:span text:style-name="T6">td</text:span>&gt;</text:p>
      <text:p text:style-name="P6">&lt;<text:span text:style-name="T6">td</text:span>&gt;Funchal&lt;/<text:span text:style-name="T6">td</text:span>&gt;</text:p>
      <text:p text:style-name="P6">&lt;<text:span text:style-name="T6">td</text:span>&gt;Futbolista profesional&lt;/<text:span text:style-name="T6">td</text:span>&gt;</text:p>
      <text:p text:style-name="P6">&lt;/<text:span text:style-name="T6">tr</text:span>&gt;</text:p>
      <text:p text:style-name="P6">&lt;/<text:span text:style-name="T6">table</text:span>&gt;</text:p>
      <text:p text:style-name="P6">&lt;/<text:span text:style-name="T6">body</text:span>&gt;</text:p>
      <text:p text:style-name="P6">&lt;/<text:span text:style-name="T6">html</text:span>&gt;</text:p>
      <text:p text:style-name="P4"/>
      <text:p text:style-name="P4">7.-</text:p>
      <text:p text:style-name="P5">&lt;!<text:span text:style-name="T6">DOCTYPE</text:span> <text:span text:style-name="T7">html</text:span>&gt;</text:p>
      <text:p text:style-name="P6">&lt;<text:span text:style-name="T6">html</text:span> <text:span text:style-name="T7">lang</text:span>=<text:span text:style-name="T6">"es"</text:span>&gt;</text:p>
      <text:p text:style-name="P6">&lt;<text:span text:style-name="T6">head</text:span>&gt;</text:p>
      <text:p text:style-name="P6">&lt;<text:span text:style-name="T6">meta</text:span> <text:span text:style-name="T7">charset</text:span>=<text:span text:style-name="T6">"UTF-8"</text:span>&gt;</text:p>
      <text:p text:style-name="P6">&lt;<text:span text:style-name="T6">meta</text:span> <text:span text:style-name="T7">name</text:span>=<text:span text:style-name="T6">"viewport"</text:span> <text:span text:style-name="T7">content</text:span>=<text:span text:style-name="T6">"width=device-width, initial-scale=1.0"</text:span>&gt;</text:p>
      <text:p text:style-name="P6">&lt;<text:span text:style-name="T6">title</text:span>&gt;Catálogo de Productos&lt;/<text:span text:style-name="T6">title</text:span>&gt;</text:p>
      <text:p text:style-name="P6">&lt;/<text:span text:style-name="T6">head</text:span>&gt;</text:p>
      <text:p text:style-name="P6">&lt;<text:span text:style-name="T6">body</text:span>&gt;</text:p>
      <text:p text:style-name="P6">&lt;<text:span text:style-name="T6">h1</text:span>&gt;Catálogo Simple de Productos&lt;/<text:span text:style-name="T6">h1</text:span>&gt;</text:p>
      <text:p text:style-name="P7"/>
      <text:p text:style-name="P6">&lt;<text:span text:style-name="T6">table</text:span> <text:span text:style-name="T8">border</text:span>=<text:span text:style-name="T6">"1"</text:span>&gt;</text:p>
      <text:p text:style-name="P6">&lt;<text:span text:style-name="T6">tr</text:span>&gt;</text:p>
      <text:p text:style-name="P6">&lt;<text:span text:style-name="T6">th</text:span>&gt;Imagen&lt;/<text:span text:style-name="T6">th</text:span>&gt;</text:p>
      <text:p text:style-name="P6">&lt;<text:span text:style-name="T6">th</text:span>&gt;Codigo&lt;/<text:span text:style-name="T6">th</text:span>&gt;</text:p>
      <text:p text:style-name="P6">&lt;<text:span text:style-name="T6">th</text:span>&gt;Nombre del producto&lt;/<text:span text:style-name="T6">th</text:span>&gt;</text:p>
      <text:p text:style-name="P6">&lt;<text:span text:style-name="T6">th</text:span>&gt;Precio&lt;/<text:span text:style-name="T6">th</text:span>&gt;</text:p>
      <text:p text:style-name="P6">&lt;<text:span text:style-name="T6">th</text:span>&gt;Disponibilidad&lt;/<text:span text:style-name="T6">th</text:span>&gt;</text:p>
      <text:p text:style-name="P6">&lt;/<text:span text:style-name="T6">tr</text:span>&gt;</text:p>
      <text:p text:style-name="P6">&lt;<text:span text:style-name="T6">tr</text:span>&gt;</text:p>
      <text:p text:style-name="P6">&lt;<text:span text:style-name="T6">td</text:span>&gt;&lt;<text:span text:style-name="T6">img</text:span> <text:span text:style-name="T7">src</text:span>=<text:span text:style-name="T6">"assets/img/olimpia.webp"</text:span> <text:span text:style-name="T7">alt</text:span>=<text:span text:style-name="T6">"Producto Olimpia"</text:span> <text:span text:style-name="T7">width</text:span>=<text:span text:style-name="T6">"120"</text:span>&gt;&lt;/<text:span text:style-name="T6">td</text:span>&gt;</text:p>
      <text:p text:style-name="P6">&lt;<text:span text:style-name="T6">td</text:span>&gt;001&lt;/<text:span text:style-name="T6">td</text:span>&gt;</text:p>
      <text:p text:style-name="P6">&lt;<text:span text:style-name="T6">td</text:span>&gt;Olimpia&lt;/<text:span text:style-name="T6">td</text:span>&gt;</text:p>
      <text:p text:style-name="P6">&lt;<text:span text:style-name="T6">td</text:span>&gt;$1.62&lt;/<text:span text:style-name="T6">td</text:span>&gt;</text:p>
      <text:p text:style-name="P6">&lt;<text:span text:style-name="T6">td</text:span>&gt;Disponible&lt;/<text:span text:style-name="T6">td</text:span>&gt;</text:p>
      <text:p text:style-name="P6">&lt;/<text:span text:style-name="T6">tr</text:span>&gt;</text:p>
      <text:p text:style-name="P6">&lt;<text:span text:style-name="T6">tr</text:span>&gt;</text:p>
      <text:p text:style-name="P6">&lt;<text:span text:style-name="T6">td</text:span>&gt;&lt;<text:span text:style-name="T6">img</text:span> <text:span text:style-name="T7">src</text:span>=<text:span text:style-name="T6">"assets/img/fuze-tea.webp"</text:span> <text:span text:style-name="T7">alt</text:span>=<text:span text:style-name="T6">"Producto Fuze Tea"</text:span> <text:span text:style-name="T7">width</text:span>=<text:span text:style-name="T6">"120"</text:span>&gt;&lt;/<text:span text:style-name="T6">td</text:span>&gt;</text:p>
      <text:p text:style-name="P6">&lt;<text:span text:style-name="T6">td</text:span>&gt;002&lt;/<text:span text:style-name="T6">td</text:span>&gt;</text:p>
      <text:p text:style-name="P6">&lt;<text:span text:style-name="T6">td</text:span>&gt;Fuze Tea&lt;/<text:span text:style-name="T6">td</text:span>&gt;</text:p>
      <text:p text:style-name="P6">&lt;<text:span text:style-name="T6">td</text:span>&gt;$2.50&lt;/<text:span text:style-name="T6">td</text:span>&gt;</text:p>
      <text:p text:style-name="P6">&lt;<text:span text:style-name="T6">td</text:span>&gt;Disponible&lt;/<text:span text:style-name="T6">td</text:span>&gt;</text:p>
      <text:p text:style-name="P6">&lt;/<text:span text:style-name="T6">tr</text:span>&gt;</text:p>
      <text:p text:style-name="P6">&lt;<text:span text:style-name="T6">tr</text:span>&gt;</text:p>
      <text:p text:style-name="P6">&lt;<text:span text:style-name="T6">td</text:span>&gt;&lt;<text:span text:style-name="T6">img</text:span> <text:span text:style-name="T7">src</text:span>=<text:span text:style-name="T6">"assets/img/resistencia.webp"</text:span> <text:span text:style-name="T7">alt</text:span>=<text:span text:style-name="T6">"Producto Resistencia"</text:span> <text:span text:style-name="T7">width</text:span>=<text:span text:style-name="T6">"120"</text:span>&gt;&lt;/<text:span text:style-name="T6">td</text:span>&gt;</text:p>
      <text:p text:style-name="P6">&lt;<text:span text:style-name="T6">td</text:span>&gt;003&lt;/<text:span text:style-name="T6">td</text:span>&gt;</text:p>
      <text:p text:style-name="P6">&lt;<text:span text:style-name="T6">td</text:span>&gt;Resistencia&lt;/<text:span text:style-name="T6">td</text:span>&gt;</text:p>
      <text:p text:style-name="P6"><text:soft-page-break/>&lt;<text:span text:style-name="T6">td</text:span>&gt;$0.50&lt;/<text:span text:style-name="T6">td</text:span>&gt;</text:p>
      <text:p text:style-name="P6">&lt;<text:span text:style-name="T6">td</text:span>&gt;Agotado&lt;/<text:span text:style-name="T6">td</text:span>&gt;</text:p>
      <text:p text:style-name="P6">&lt;/<text:span text:style-name="T6">tr</text:span>&gt;</text:p>
      <text:p text:style-name="P6">&lt;/<text:span text:style-name="T6">table</text:span>&gt;</text:p>
      <text:p text:style-name="P6">&lt;/<text:span text:style-name="T6">body</text:span>&gt;</text:p>
      <text:p text:style-name="P6">&lt;/<text:span text:style-name="T6">html</text:span>&gt;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deNewRoman Nerd Font Propo" svg:font-family="'CodeNewRoman Nerd Font Propo', Consolas, 'Courier New', monospace, 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19:01:21.665828865</meta:creation-date>
    <dc:date>2026-06-01T19:34:11.966344451</dc:date>
    <meta:editing-duration>PT22M33S</meta:editing-duration>
    <meta:editing-cycles>1</meta:editing-cycles>
    <meta:document-statistic meta:table-count="0" meta:image-count="0" meta:object-count="0" meta:page-count="3" meta:paragraph-count="83" meta:word-count="401" meta:character-count="3022" meta:non-whitespace-character-count="2702"/>
    <meta:generator>LibreOffice/26.2.3.2$Linux_X86_64 LibreOffice_project/d4d5ed47b6084125f28d269a5650105d54dde034</meta:generator>
  </office:meta>
</office:document-meta>
</file>