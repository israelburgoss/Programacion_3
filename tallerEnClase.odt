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Mono-Bold" svg:font-family="JetbrainsMono-Bold, Consolas, 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180" officeooo:paragraph-rsid="00166180"/>
    </style:style>
    <style:style style:name="P2" style:family="paragraph" style:parent-style-name="Standard">
      <style:text-properties fo:color="#939da5" loext:opacity="100%" style:font-name="JetbrainsMono-Bold" fo:font-size="10.5pt" fo:font-weight="normal" officeooo:rsid="00166180" officeooo:paragraph-rsid="00166180" fo:background-color="#232a2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939da5" loext:opacity="100%" style:font-name="JetbrainsMono-Bold" fo:font-size="10.5pt" fo:font-weight="normal" fo:background-color="#232a2f"/>
    </style:style>
    <style:style style:name="P4" style:family="paragraph" style:parent-style-name="Standard">
      <style:text-properties fo:color="#ff6a80" loext:opacity="100%" style:font-name="JetbrainsMono-Bold" fo:font-size="10.5pt" fo:font-weight="normal" officeooo:rsid="00166180" officeooo:paragraph-rsid="00166180" fo:background-color="#232a2f"/>
    </style:style>
    <style:style style:name="P5" style:family="paragraph" style:parent-style-name="Standard">
      <style:paragraph-properties style:line-height-at-least="0.198in"/>
    </style:style>
    <style:style style:name="T1" style:family="text">
      <style:text-properties fo:color="#ff6a80" loext:opacity="100%"/>
    </style:style>
    <style:style style:name="T2" style:family="text">
      <style:text-properties fo:color="#ffa763" loext:opacity="100%"/>
    </style:style>
    <style:style style:name="T3" style:family="text">
      <style:text-properties fo:color="#5bec95" loext:opacity="100%"/>
    </style:style>
    <style:style style:name="T4" style:family="text">
      <style:text-properties fo:color="#89ddff" loext:opacity="100%"/>
    </style:style>
    <style:style style:name="T5" style:family="text">
      <style:text-properties fo:color="#707a8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en Clase</text:p>
      <text:p text:style-name="P1">Israel Burgos</text:p>
      <text:p text:style-name="P1"/>
      <text:p text:style-name="P1">HTML</text:p>
      <text:p text:style-name="P2">&lt;!<text:span text:style-name="T1">DOCTYPE</text:span> <text:span text:style-name="T2">html</text:span>&gt;</text:p>
      <text:p text:style-name="P3">&lt;<text:span text:style-name="T1">html</text:span> <text:span text:style-name="T2">lang</text:span>=<text:span text:style-name="T3">"en"</text:span>&gt;</text:p>
      <text:p text:style-name="P3">&lt;<text:span text:style-name="T1">head</text:span>&gt;</text:p>
      <text:p text:style-name="P3">&lt;<text:span text:style-name="T1">link</text:span> <text:span text:style-name="T2">rel</text:span>=<text:span text:style-name="T3">"stylesheet"</text:span> <text:span text:style-name="T2">href</text:span>=<text:span text:style-name="T3">"./style.css"</text:span>&gt;</text:p>
      <text:p text:style-name="P3">&lt;<text:span text:style-name="T1">meta</text:span> <text:span text:style-name="T2">charset</text:span>=<text:span text:style-name="T3">"UTF-8"</text:span>&gt;</text:p>
      <text:p text:style-name="P3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&gt;</text:p>
      <text:p text:style-name="P3">&lt;<text:span text:style-name="T1">title</text:span>&gt;Practica 2&lt;/<text:span text:style-name="T1">title</text:span>&gt;</text:p>
      <text:p text:style-name="P3">&lt;/<text:span text:style-name="T1">head</text:span>&gt;</text:p>
      <text:p text:style-name="P3">&lt;<text:span text:style-name="T1">body</text:span>&gt;</text:p>
      <text:p text:style-name="P3">&lt;<text:span text:style-name="T1">h1</text:span>&gt;Tabla de Datos&lt;/<text:span text:style-name="T1">h1</text:span>&gt;</text:p>
      <text:p text:style-name="P3">&lt;<text:span text:style-name="T1">table</text:span>&gt;</text:p>
      <text:p text:style-name="P3">&lt;<text:span text:style-name="T1">tr</text:span>&gt;</text:p>
      <text:p text:style-name="P3">&lt;<text:span text:style-name="T1">td</text:span>&gt;Israel&lt;/<text:span text:style-name="T1">td</text:span>&gt;</text:p>
      <text:p text:style-name="P3">&lt;<text:span text:style-name="T1">td</text:span>&gt;Jese&lt;/<text:span text:style-name="T1">td</text:span>&gt;</text:p>
      <text:p text:style-name="P3">&lt;/<text:span text:style-name="T1">tr</text:span>&gt;</text:p>
      <text:p text:style-name="P3">&lt;<text:span text:style-name="T1">tr</text:span>&gt;</text:p>
      <text:p text:style-name="P3">&lt;<text:span text:style-name="T1">td</text:span>&gt;Burgos&lt;/<text:span text:style-name="T1">td</text:span>&gt;</text:p>
      <text:p text:style-name="P3">&lt;<text:span text:style-name="T1">td</text:span>&gt;Salazar&lt;/<text:span text:style-name="T1">td</text:span>&gt;</text:p>
      <text:p text:style-name="P3">&lt;/<text:span text:style-name="T1">tr</text:span>&gt;</text:p>
      <text:p text:style-name="P3">&lt;/<text:span text:style-name="T1">table</text:span>&gt;</text:p>
      <text:p text:style-name="P3">&lt;/<text:span text:style-name="T1">body</text:span>&gt;</text:p>
      <text:p text:style-name="P3">&lt;/<text:span text:style-name="T1">html</text:span>&gt;</text:p>
      <text:p text:style-name="P1"/>
      <text:p text:style-name="P1">CSS</text:p>
      <text:p text:style-name="P4">body</text:p>
      <text:p text:style-name="P3">{</text:p>
      <text:p text:style-name="P3">font-family:Arial;</text:p>
      <text:p text:style-name="P3">background-color: <text:span text:style-name="T2">#a9a9a9</text:span>;</text:p>
      <text:p text:style-name="P3">color:<text:span text:style-name="T2">#2c3e90</text:span>;</text:p>
      <text:p text:style-name="P3">text-align:<text:span text:style-name="T2">center</text:span>;</text:p>
      <text:p text:style-name="P3">padding: <text:span text:style-name="T4">24</text:span><text:span text:style-name="T2">px</text:span>; <text:span text:style-name="T5">/*Espaciado entre celdas*/</text:span></text:p>
      <text:p text:style-name="P3">}</text:p>
      <text:p text:style-name="P5"/>
      <text:p text:style-name="P3"><text:span text:style-name="T1">table</text:span>, <text:span text:style-name="T1">th</text:span>, <text:span text:style-name="T1">td</text:span></text:p>
      <text:p text:style-name="P3">{</text:p>
      <text:p text:style-name="P3">border: <text:span text:style-name="T4">2</text:span><text:span text:style-name="T2">px solid red</text:span>;</text:p>
      <text:p text:style-name="P3">border-collapse:<text:span text:style-name="T2">collapse</text:span>; <text:span text:style-name="T5">/*uner los bordes dobles en una linea*/</text:span></text:p>
      <text:p text:style-name="P3">font-family:Sans-serif;</text:p>
      <text:p text:style-name="P3">background-color: <text:span text:style-name="T2">#f4f4f9</text:span>;</text:p>
      <text:p text:style-name="P3">color:<text:span text:style-name="T2">#856</text:span>;</text:p>
      <text:p text:style-name="P3">text-align:<text:span text:style-name="T2">center</text:span>;</text:p>
      <text:p text:style-name="P3">padding: <text:span text:style-name="T4">8</text:span><text:span text:style-name="T2">px</text:span>; <text:span text:style-name="T5">/*Espaciado entre celdas*/</text:span></text:p>
      <text:p text:style-name="P3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Mono-Bold" svg:font-family="JetbrainsMono-Bold, Consolas, 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3T19:31:29.406569756</meta:creation-date>
    <dc:date>2026-06-03T19:35:23.512146331</dc:date>
    <meta:editing-duration>PT3M55S</meta:editing-duration>
    <meta:editing-cycles>1</meta:editing-cycles>
    <meta:document-statistic meta:table-count="0" meta:image-count="0" meta:object-count="0" meta:page-count="1" meta:paragraph-count="44" meta:word-count="80" meta:character-count="716" meta:non-whitespace-character-count="680"/>
    <meta:generator>LibreOffice/26.2.3.2$Linux_X86_64 LibreOffice_project/d4d5ed47b6084125f28d269a5650105d54dde034</meta:generator>
  </office:meta>
</office:document-meta>
</file>