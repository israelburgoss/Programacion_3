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200000262E1F752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Mono-Bold" svg:font-family="JetbrainsMono-Bold, Consolas, 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c95e" officeooo:paragraph-rsid="0004c95e"/>
    </style:style>
    <style:style style:name="P2" style:family="paragraph" style:parent-style-name="Standard">
      <style:paragraph-properties fo:text-align="left" style:justify-single-word="false"/>
      <style:text-properties officeooo:rsid="0004c95e" officeooo:paragraph-rsid="0004c95e"/>
    </style:style>
    <style:style style:name="P3" style:family="paragraph" style:parent-style-name="Standard">
      <style:paragraph-properties fo:text-align="left" style:justify-single-word="false"/>
      <style:text-properties fo:color="#939da5" loext:opacity="100%" style:font-name="JetbrainsMono-Bold" fo:font-size="10.5pt" fo:font-weight="normal" officeooo:rsid="0004c95e" officeooo:paragraph-rsid="0004c95e" fo:background-color="#232a2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939da5" loext:opacity="100%" style:font-name="JetbrainsMono-Bold" fo:font-size="10.5pt" fo:font-weight="normal" fo:background-color="#232a2f"/>
    </style:style>
    <style:style style:name="P5" style:family="paragraph" style:parent-style-name="Standard">
      <style:paragraph-properties style:line-height-at-least="0.198in"/>
    </style:style>
    <style:style style:name="T1" style:family="text">
      <style:text-properties fo:color="#ff6a80" loext:opacity="100%"/>
    </style:style>
    <style:style style:name="T2" style:family="text">
      <style:text-properties fo:color="#ffa763" loext:opacity="100%"/>
    </style:style>
    <style:style style:name="T3" style:family="text">
      <style:text-properties fo:color="#5bec95" loext:opacity="100%"/>
    </style:style>
    <style:style style:name="T4" style:family="text">
      <style:text-properties fo:color="#89ddff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6</text:p>
      <text:p text:style-name="P2">Israel Burgos</text:p>
      <text:p text:style-name="P2"/>
      <text:p text:style-name="P2">index.html</text:p>
      <text:p text:style-name="P2"/>
      <text:p text:style-name="P3">&lt;!<text:span text:style-name="T1">DOCTYPE</text:span> <text:span text:style-name="T2">html</text:span>&gt;</text:p>
      <text:p text:style-name="P4">&lt;<text:span text:style-name="T1">html</text:span> <text:span text:style-name="T2">lang</text:span>=<text:span text:style-name="T3">"es"</text:span>&gt;</text:p>
      <text:p text:style-name="P4">&lt;<text:span text:style-name="T1">head</text:span>&gt;</text:p>
      <text:p text:style-name="P4">&lt;<text:span text:style-name="T1">meta</text:span> <text:span text:style-name="T2">charset</text:span>=<text:span text:style-name="T3">"UTF-8"</text:span>&gt;</text:p>
      <text:p text:style-name="P4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&gt;</text:p>
      <text:p text:style-name="P4">&lt;<text:span text:style-name="T1">link</text:span> <text:span text:style-name="T2">rel</text:span>=<text:span text:style-name="T3">"stylesheet"</text:span> <text:span text:style-name="T2">href</text:span>=<text:span text:style-name="T3">"style2.css"</text:span>&gt;</text:p>
      <text:p text:style-name="P4">&lt;<text:span text:style-name="T1">title</text:span>&gt;Taller 6&lt;/<text:span text:style-name="T1">title</text:span>&gt;</text:p>
      <text:p text:style-name="P4">&lt;/<text:span text:style-name="T1">head</text:span>&gt;</text:p>
      <text:p text:style-name="P4">&lt;<text:span text:style-name="T1">body</text:span>&gt;</text:p>
      <text:p text:style-name="P4">&lt;<text:span text:style-name="T1">h1</text:span>&gt; Barcelona Sporting Club &lt;/<text:span text:style-name="T1">h1</text:span>&gt;</text:p>
      <text:p text:style-name="P4">&lt;<text:span text:style-name="T1">p</text:span>&gt; El Barcelona Sporting Club es un equipo de fútbol profesional de Ecuador, con sede en Guayaquil. </text:p>
      <text:p text:style-name="P4">Fundado el 1 de mayo de 1925, es uno de los clubes más exitosos y populares del país. </text:p>
      <text:p text:style-name="P4">El equipo ha ganado numerosos títulos nacionales, siendo el equipo más exitoso de la Serie A de Ecuador. </text:p>
      <text:p text:style-name="P4">El Barcelona SC es conocido por su apasionada base de seguidores y su rivalidad histórica con el Club Sport Emelec, </text:p>
      <text:p text:style-name="P4">otro equipo de Guayaquil. &lt;/<text:span text:style-name="T1">p</text:span>&gt;</text:p>
      <text:p text:style-name="P4">&lt;<text:span text:style-name="T1">img</text:span> <text:span text:style-name="T2">src</text:span>=<text:span text:style-name="T3">"/assets/img/Barcelona_Sporting_Club_Logo.png"</text:span> <text:span text:style-name="T2">alt</text:span>=<text:span text:style-name="T3">"Logo del Barcelona Sporting Club"</text:span>&gt;</text:p>
      <text:p text:style-name="P4">&lt;<text:span text:style-name="T1">h2</text:span>&gt; Datos del Club&lt;/<text:span text:style-name="T1">h2</text:span>&gt;</text:p>
      <text:p text:style-name="P4">&lt;<text:span text:style-name="T1">ul</text:span>&gt;</text:p>
      <text:p text:style-name="P4">&lt;<text:span text:style-name="T1">li</text:span>&gt;Fundación: 1 de mayo de 1925&lt;/<text:span text:style-name="T1">li</text:span>&gt;</text:p>
      <text:p text:style-name="P4">&lt;<text:span text:style-name="T1">li</text:span>&gt;Estadio: Estadio Monumental Isidro Romero Carbo&lt;/<text:span text:style-name="T1">li</text:span>&gt;</text:p>
      <text:p text:style-name="P4">&lt;<text:span text:style-name="T1">li</text:span>&gt;Capacidad: 59,283 espectadores&lt;/<text:span text:style-name="T1">li</text:span>&gt;</text:p>
      <text:p text:style-name="P4">&lt;/<text:span text:style-name="T1">ul</text:span>&gt;</text:p>
      <text:p text:style-name="P4">&lt;<text:span text:style-name="T1">h2</text:span>&gt; Logros Destacados &lt;/<text:span text:style-name="T1">h2</text:span>&gt;</text:p>
      <text:p text:style-name="P4">&lt;<text:span text:style-name="T1">ol</text:span>&gt;</text:p>
      <text:p text:style-name="P4">&lt;<text:span text:style-name="T1">li</text:span>&gt;Campeón de la Serie A de Ecuador: 16 títulos&lt;/<text:span text:style-name="T1">li</text:span>&gt;</text:p>
      <text:p text:style-name="P4">&lt;<text:span text:style-name="T1">li</text:span>&gt;Subcampeón de la Copa Libertadores: 2 veces (1990, 1998)&lt;/<text:span text:style-name="T1">li</text:span>&gt;</text:p>
      <text:p text:style-name="P4">&lt;/<text:span text:style-name="T1">ol</text:span>&gt;</text:p>
      <text:p text:style-name="P4">&lt;<text:span text:style-name="T1">a</text:span> <text:span text:style-name="T2">href</text:span>=<text:span text:style-name="T3">"https://www.barcelonasc.com.ec/"</text:span> <text:span text:style-name="T2">target</text:span>=<text:span text:style-name="T3">"_blank"</text:span>&gt;Sitio Web Oficial&lt;/<text:span text:style-name="T1">a</text:span>&gt;</text:p>
      <text:p text:style-name="P4">&lt;/<text:span text:style-name="T1">body</text:span>&gt;</text:p>
      <text:p text:style-name="P4">&lt;/<text:span text:style-name="T1">html</text:span>&gt;</text:p>
      <text:p text:style-name="P2"/>
      <text:p text:style-name="P2">style2.css</text:p>
      <text:p text:style-name="P3"><text:span text:style-name="T1">h1</text:span>{</text:p>
      <text:p text:style-name="P4">color: <text:span text:style-name="T2">#333</text:span>;</text:p>
      <text:p text:style-name="P4">font-family: <text:span text:style-name="T3">'Arial'</text:span><text:span text:style-name="T2">, </text:span>sans-serif;</text:p>
      <text:p text:style-name="P4">text-align: <text:span text:style-name="T2">center</text:span>;</text:p>
      <text:p text:style-name="P4">margin-top: <text:span text:style-name="T4">20</text:span><text:span text:style-name="T2">px</text:span>;</text:p>
      <text:p text:style-name="P4">}</text:p>
      <text:p text:style-name="P5"/>
      <text:p text:style-name="P4"><text:span text:style-name="T1">p</text:span>{</text:p>
      <text:p text:style-name="P4">color: <text:span text:style-name="T2">#666</text:span>;</text:p>
      <text:p text:style-name="P4">font-family: <text:span text:style-name="T3">'Arial'</text:span><text:span text:style-name="T2">, </text:span>sans-serif;</text:p>
      <text:p text:style-name="P4"><text:soft-page-break/>text-align: <text:span text:style-name="T2">justify</text:span>;</text:p>
      <text:p text:style-name="P4">margin: <text:span text:style-name="T4">20</text:span><text:span text:style-name="T2">px</text:span>;</text:p>
      <text:p text:style-name="P4">}</text:p>
      <text:p text:style-name="P5"/>
      <text:p text:style-name="P4"><text:span text:style-name="T1">img</text:span>{</text:p>
      <text:p text:style-name="P4">display: <text:span text:style-name="T2">block</text:span>;</text:p>
      <text:p text:style-name="P4">margin: <text:span text:style-name="T4">20</text:span><text:span text:style-name="T2">px auto</text:span>;</text:p>
      <text:p text:style-name="P4">max-width: <text:span text:style-name="T4">100</text:span>%;</text:p>
      <text:p text:style-name="P4">height: <text:span text:style-name="T4">100</text:span><text:span text:style-name="T2">px</text:span>;</text:p>
      <text:p text:style-name="P4">}</text:p>
      <text:p text:style-name="P5"/>
      <text:p text:style-name="P4"><text:span text:style-name="T1">h2</text:span>{</text:p>
      <text:p text:style-name="P4">color: <text:span text:style-name="T2">#333</text:span>;</text:p>
      <text:p text:style-name="P4">font-family: <text:span text:style-name="T3">'Arial'</text:span><text:span text:style-name="T2">, </text:span>sans-serif;</text:p>
      <text:p text:style-name="P4">text-align: <text:span text:style-name="T2">left</text:span>;</text:p>
      <text:p text:style-name="P4">margin-top: <text:span text:style-name="T4">20</text:span><text:span text:style-name="T2">px</text:span>;</text:p>
      <text:p text:style-name="P4">}</text:p>
      <text:p text:style-name="P5"/>
      <text:p text:style-name="P4"><text:span text:style-name="T1">ul</text:span>{</text:p>
      <text:p text:style-name="P4">color: <text:span text:style-name="T2">#666</text:span>;</text:p>
      <text:p text:style-name="P4">font-family: <text:span text:style-name="T3">'Arial'</text:span><text:span text:style-name="T2">, </text:span>sans-serif;</text:p>
      <text:p text:style-name="P4">margin: <text:span text:style-name="T4">20</text:span><text:span text:style-name="T2">px</text:span>;</text:p>
      <text:p text:style-name="P4">}</text:p>
      <text:p text:style-name="P5"/>
      <text:p text:style-name="P4"><text:span text:style-name="T1">li</text:span>{</text:p>
      <text:p text:style-name="P4">margin-bottom: <text:span text:style-name="T4">10</text:span><text:span text:style-name="T2">px</text:span>;</text:p>
      <text:p text:style-name="P4">font-family: <text:span text:style-name="T3">'Arial'</text:span><text:span text:style-name="T2">, </text:span>sans-serif;</text:p>
      <text:p text:style-name="P4">}</text:p>
      <text:p text:style-name="P5"/>
      <text:p text:style-name="P4"><text:span text:style-name="T1">a</text:span>{</text:p>
      <text:p text:style-name="P4">color: <text:span text:style-name="T2">#007BFF</text:span>;</text:p>
      <text:p text:style-name="P4">text-decoration: <text:span text:style-name="T2">none</text:span>;</text:p>
      <text:p text:style-name="P4">}</text:p>
      <text:p text:style-name="P5"/>
      <text:p text:style-name="P4"><text:span text:style-name="T1">body</text:span>{</text:p>
      <text:p text:style-name="P4">background-color: <text:span text:style-name="T2">#aab964</text:span>;</text:p>
      <text:p text:style-name="P4">margin: <text:span text:style-name="T4">0</text:span>;</text:p>
      <text:p text:style-name="P4">padding: <text:span text:style-name="T4">0</text:span>;</text:p>
      <text:p text:style-name="P4">}</text:p>
      <text:p text:style-name="P2"/>
      <text:p text:style-name="P2"><draw:frame draw:style-name="fr1" draw:name="Image1" text:anchor-type="char" svg:width="6.6929in" svg:height="2.9972in" draw:z-index="0"><draw:image xlink:href="Pictures/100000010000055200000262E1F7522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Mono-Bold" svg:font-family="JetbrainsMono-Bold, Consolas, 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6T17:38:14.379397777</meta:creation-date>
    <meta:generator>LibreOffice/26.2.3.2$Linux_X86_64 LibreOffice_project/d4d5ed47b6084125f28d269a5650105d54dde034</meta:generator>
    <dc:date>2026-06-06T18:06:33.664034014</dc:date>
    <meta:editing-duration>PT2M1S</meta:editing-duration>
    <meta:editing-cycles>1</meta:editing-cycles>
    <meta:document-statistic meta:table-count="0" meta:image-count="1" meta:object-count="0" meta:page-count="3" meta:paragraph-count="76" meta:word-count="240" meta:character-count="1756" meta:non-whitespace-character-count="1588"/>
  </office:meta>
</office:document-meta>
</file>